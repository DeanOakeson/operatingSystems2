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erif Condensed" svg:font-family="'DejaVu Serif Condensed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 style:writing-mode="lr-tb"/>
    </style:style>
    <style:style style:name="P2" style:family="paragraph" style:parent-style-name="Standard">
      <style:paragraph-properties fo:text-align="left" style:justify-single-word="false" style:writing-mode="lr-tb"/>
      <style:text-properties style:font-name="DejaVu Serif Condensed"/>
    </style:style>
    <style:style style:name="P3" style:family="paragraph" style:parent-style-name="Standard">
      <style:paragraph-properties fo:text-align="left" style:justify-single-word="false" style:writing-mode="lr-tb"/>
      <style:text-properties style:font-name="DejaVu Serif Condensed" fo:font-size="14pt" style:font-size-asian="14pt" style:font-size-complex="14pt"/>
    </style:style>
    <style:style style:name="P4" style:family="paragraph" style:parent-style-name="Standard">
      <style:paragraph-properties fo:text-align="left" style:justify-single-word="false" style:writing-mode="lr-tb"/>
      <style:text-properties style:font-name="DejaVu Serif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DejaVu Serif Condensed" fo:font-size="28pt" fo:font-style="italic" fo:font-weight="bold" officeooo:rsid="0010f685" officeooo:paragraph-rsid="0010f685" style:font-size-asian="28pt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solid" style:text-underline-width="auto" style:text-underline-color="font-color" fo:font-weight="bold" officeooo:rsid="0010f685" officeooo:paragraph-rsid="0010f685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left" style:justify-single-word="false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left" style:justify-single-word="false" style:writing-mode="lr-tb"/>
      <style:text-properties style:font-name="DejaVu Serif Condensed"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Standard">
      <style:paragraph-properties fo:text-align="left" style:justify-single-word="false" style:writing-mode="lr-tb"/>
      <style:text-properties style:font-name="DejaVu Serif Condensed" fo:font-size="20pt" fo:font-style="italic" style:text-underline-style="none" fo:font-weight="bold" officeooo:rsid="0010f685" officeooo:paragraph-rsid="0010f685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none" fo:font-weight="bold" officeooo:rsid="0010f685" officeooo:paragraph-rsid="0010f685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officeooo:rsid="0010f685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fo:font-weight="bold" officeooo:rsid="0010f685" officeooo:paragraph-rsid="0010f685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none" fo:font-weight="bold" officeooo:rsid="0010f685" officeooo:paragraph-rsid="0011293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fo:font-weight="normal" officeooo:rsid="0010f685" officeooo:paragraph-rsid="0010f68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fo:font-weight="bold" officeooo:rsid="0010f685" officeooo:paragraph-rsid="0011293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solid" style:text-underline-width="auto" style:text-underline-color="font-color" fo:font-weight="bold" officeooo:rsid="0010f685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none" fo:font-weight="bold" officeooo:rsid="0010f685" officeooo:paragraph-rsid="001185ff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left" style:justify-single-word="false" style:writing-mode="lr-tb"/>
      <style:text-properties style:font-name="DejaVu Serif Condensed" fo:font-style="italic" style:text-underline-style="none" style:font-style-asian="italic" style:font-style-complex="italic"/>
    </style:style>
    <style:style style:name="P20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solid" style:text-underline-width="auto" style:text-underline-color="font-color" fo:font-weight="bold" officeooo:rsid="0011293d" officeooo:paragraph-rsid="0011293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left" style:justify-single-word="false" style:writing-mode="lr-tb"/>
      <style:text-properties style:font-name="DejaVu Serif Condensed" fo:font-size="20pt" fo:font-style="italic" style:text-underline-style="none" fo:font-weight="bold" officeooo:rsid="0011293d" officeooo:paragraph-rsid="0011293d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italic" style:text-underline-style="solid" style:text-underline-width="auto" style:text-underline-color="font-color" fo:font-weight="bold" officeooo:paragraph-rsid="0011293d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officeooo:rsid="0010f685" officeooo:paragraph-rsid="0011293d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fo:font-weight="normal" officeooo:rsid="0010f685" officeooo:paragraph-rsid="0011293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left" style:justify-single-word="false" style:writing-mode="lr-tb"/>
      <style:text-properties style:font-name="DejaVu Serif Condensed" officeooo:rsid="0011293d" officeooo:paragraph-rsid="0011293d"/>
    </style:style>
    <style:style style:name="P26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solid" style:text-underline-width="auto" style:text-underline-color="font-color" fo:font-weight="bold" officeooo:rsid="0011293d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left" style:justify-single-word="false" style:writing-mode="lr-tb"/>
      <style:text-properties style:font-name="DejaVu Serif Condensed" fo:font-size="20pt" fo:font-style="italic" style:text-underline-style="solid" style:text-underline-width="auto" style:text-underline-color="font-color" fo:font-weight="bold" officeooo:rsid="0011293d" officeooo:paragraph-rsid="0011293d" style:font-size-asian="20pt" style:font-style-asian="italic" style:font-weight-asian="bold" style:font-size-complex="20pt" style:font-style-complex="italic" style:font-weight-complex="bold"/>
    </style:style>
    <style:style style:name="P28" style:family="paragraph" style:parent-style-name="Standard">
      <style:paragraph-properties fo:text-align="left" style:justify-single-word="false" style:writing-mode="lr-tb"/>
      <style:text-properties style:font-name="DejaVu Serif Condensed" fo:font-size="20pt" fo:font-style="italic" style:text-underline-style="solid" style:text-underline-width="auto" style:text-underline-color="font-color" fo:font-weight="bold" officeooo:paragraph-rsid="0011293d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solid" style:text-underline-width="auto" style:text-underline-color="font-color" fo:font-weight="bold" officeooo:rsid="0010f685" officeooo:paragraph-rsid="001185ff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officeooo:rsid="001185ff" officeooo:paragraph-rsid="001185ff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DejaVu Serif Condensed" fo:font-size="28pt" fo:font-style="italic" fo:font-weight="bold" officeooo:rsid="0010f685" officeooo:paragraph-rsid="0013643b" style:font-size-asian="28pt" style:font-style-asian="italic" style:font-weight-asian="bold" style:font-size-complex="28pt" style:font-style-complex="italic" style:font-weight-complex="bold"/>
    </style:style>
    <style:style style:name="P32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solid" style:text-underline-width="auto" style:text-underline-color="font-color" fo:font-weight="bold" officeooo:rsid="0010f685" officeooo:paragraph-rsid="0013643b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left" style:justify-single-word="false" style:writing-mode="lr-tb"/>
      <style:text-properties style:font-name="DejaVu Serif Condensed" officeooo:paragraph-rsid="0013643b"/>
    </style:style>
    <style:style style:name="P34" style:family="paragraph" style:parent-style-name="Standard">
      <style:paragraph-properties fo:text-align="left" style:justify-single-word="false" style:writing-mode="lr-tb"/>
      <style:text-properties fo:font-weight="bold" officeooo:paragraph-rsid="0013643b" style:font-weight-asian="bold" style:font-weight-complex="bold"/>
    </style:style>
    <style:style style:name="P35" style:family="paragraph" style:parent-style-name="Standard">
      <style:paragraph-properties fo:text-align="left" style:justify-single-word="false" style:writing-mode="lr-tb"/>
      <style:text-properties officeooo:paragraph-rsid="0013643b"/>
    </style:style>
    <style:style style:name="P36" style:family="paragraph" style:parent-style-name="Standard">
      <style:paragraph-properties fo:text-align="left" style:justify-single-word="false" style:writing-mode="lr-tb"/>
      <style:text-properties style:font-name="DejaVu Serif Condensed" fo:font-size="20pt" fo:font-style="italic" style:text-underline-style="none" fo:font-weight="bold" officeooo:rsid="0013643b" officeooo:paragraph-rsid="0013643b" style:font-size-asian="20pt" style:font-style-asian="italic" style:font-weight-asian="bold" style:font-size-complex="20pt" style:font-style-complex="italic" style:font-weight-complex="bold"/>
    </style:style>
    <style:style style:name="P37" style:family="paragraph" style:parent-style-name="Standard">
      <style:paragraph-properties fo:text-align="left" style:justify-single-word="false" style:writing-mode="lr-tb"/>
      <style:text-properties style:font-name="DejaVu Serif Condensed" fo:font-size="20pt" fo:font-style="italic" style:text-underline-style="none" fo:font-weight="bold" officeooo:rsid="0011293d" officeooo:paragraph-rsid="0013643b" style:font-size-asian="20pt" style:font-style-asian="italic" style:font-weight-asian="bold" style:font-size-complex="20pt" style:font-style-complex="italic" style:font-weight-complex="bold"/>
    </style:style>
    <style:style style:name="P38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solid" style:text-underline-width="auto" style:text-underline-color="font-color" fo:font-weight="bold" officeooo:rsid="0011293d" officeooo:paragraph-rsid="0013643b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none" fo:font-weight="bold" officeooo:rsid="0010f685" officeooo:paragraph-rsid="0013643b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italic" style:text-underline-style="solid" style:text-underline-width="auto" style:text-underline-color="font-color" fo:font-weight="bold" officeooo:paragraph-rsid="0013643b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officeooo:rsid="0013643b" officeooo:paragraph-rsid="0013643b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officeooo:rsid="0010f685" officeooo:paragraph-rsid="0013643b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fo:font-weight="bold" officeooo:rsid="0013643b" officeooo:paragraph-rsid="0013643b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fo:font-weight="bold" officeooo:rsid="0010f685" officeooo:paragraph-rsid="0013643b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left" style:justify-single-word="false" style:writing-mode="lr-tb"/>
      <style:text-properties style:font-name="DejaVu Serif Condensed" fo:font-size="12pt" fo:font-style="normal" style:text-underline-style="none" fo:font-weight="normal" officeooo:rsid="0010f685" officeooo:paragraph-rsid="0013643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left" style:justify-single-word="false" style:writing-mode="lr-tb"/>
      <style:text-properties style:font-name="DejaVu Serif Condensed" officeooo:rsid="0011293d" officeooo:paragraph-rsid="0013643b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DejaVu Serif Condensed" fo:font-size="28pt" fo:font-style="italic" fo:font-weight="bold" officeooo:rsid="0010f685" officeooo:paragraph-rsid="0014d948" style:font-size-asian="28pt" style:font-style-asian="italic" style:font-weight-asian="bold" style:font-size-complex="28pt" style:font-style-complex="italic" style:font-weight-complex="bold"/>
    </style:style>
    <style:style style:name="P48" style:family="paragraph" style:parent-style-name="Standard">
      <style:paragraph-properties fo:text-align="left" style:justify-single-word="false" style:writing-mode="lr-tb"/>
      <style:text-properties style:font-name="DejaVu Serif Condensed" fo:font-size="14pt" fo:font-style="italic" style:text-underline-style="solid" style:text-underline-width="auto" style:text-underline-color="font-color" fo:font-weight="bold" officeooo:rsid="0010f685" officeooo:paragraph-rsid="0014d948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paragraph-properties fo:text-align="left" style:justify-single-word="false" style:writing-mode="lr-tb"/>
      <style:text-properties style:font-name="DejaVu Serif Condensed" officeooo:paragraph-rsid="0014d948"/>
    </style:style>
    <style:style style:name="P50" style:family="paragraph" style:parent-style-name="Standard">
      <style:paragraph-properties fo:text-align="left" style:justify-single-word="false" style:writing-mode="lr-tb"/>
      <style:text-properties fo:font-weight="bold" officeooo:paragraph-rsid="0014d948" style:font-weight-asian="bold" style:font-weight-complex="bold"/>
    </style:style>
    <style:style style:name="P51" style:family="paragraph" style:parent-style-name="Standard">
      <style:paragraph-properties fo:text-align="left" style:justify-single-word="false" style:writing-mode="lr-tb"/>
      <style:text-properties officeooo:paragraph-rsid="0014d948"/>
    </style:style>
    <style:style style:name="T1" style:family="text">
      <style:text-properties style:font-name="DejaVu Serif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style:font-name="DejaVu Serif Condensed"/>
    </style:style>
    <style:style style:name="T3" style:family="text">
      <style:text-properties style:font-name="DejaVu Serif Condensed" fo:font-size="14pt" style:font-size-asian="14pt" style:font-size-complex="14pt"/>
    </style:style>
    <style:style style:name="T4" style:family="text">
      <style:text-properties style:font-name="DejaVu Serif Condensed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style:font-name="DejaVu Serif Condensed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font-name="DejaVu Serif Condensed" fo:font-size="14pt" officeooo:rsid="0011293d" style:font-size-asian="14pt" style:font-size-complex="14pt"/>
    </style:style>
    <style:style style:name="T7" style:family="text">
      <style:text-properties style:font-name="DejaVu Serif Condensed" fo:font-size="14pt" officeooo:rsid="0013643b" style:font-size-asian="14pt" style:font-size-complex="14pt"/>
    </style:style>
    <style:style style:name="T8" style:family="text">
      <style:text-properties style:font-name="DejaVu Serif Condensed" officeooo:rsid="0010f685"/>
    </style:style>
    <style:style style:name="T9" style:family="text">
      <style:text-properties style:font-name="DejaVu Serif Condensed" fo:font-style="italic" style:text-underline-style="none" style:font-style-asian="italic" style:font-style-complex="italic"/>
    </style:style>
    <style:style style:name="T10" style:family="text">
      <style:text-properties style:font-name="DejaVu Serif Condensed" fo:font-style="italic" style:text-underline-style="none" officeooo:rsid="001185ff" style:font-style-asian="italic" style:font-style-complex="italic"/>
    </style:style>
    <style:style style:name="T11" style:family="text">
      <style:text-properties style:font-name="DejaVu Serif Condensed" fo:font-style="italic" style:text-underline-style="none" officeooo:rsid="0010f685" style:font-style-asian="italic" style:font-style-complex="italic"/>
    </style:style>
    <style:style style:name="T12" style:family="text">
      <style:text-properties style:font-name="DejaVu Serif Condensed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officeooo:rsid="0011293d"/>
    </style:style>
    <style:style style:name="T14" style:family="text">
      <style:text-properties style:font-name="DejaVu Serif Condensed" fo:font-size="12pt" fo:font-style="italic" style:text-underline-style="none" style:font-size-asian="12pt" style:font-style-asian="italic" style:font-size-complex="12pt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1293d" style:font-weight-asian="normal" style:font-weight-complex="normal"/>
    </style:style>
    <style:style style:name="T18" style:family="text">
      <style:text-properties officeooo:rsid="001185ff"/>
    </style:style>
    <style:style style:name="T19" style:family="text">
      <style:text-properties fo:font-weight="bold" officeooo:rsid="0011293d" style:font-weight-asian="bold" style:font-weight-complex="bold"/>
    </style:style>
    <style:style style:name="T20" style:family="text">
      <style:text-properties fo:font-weight="bold" officeooo:rsid="001185ff" style:font-weight-asian="bold" style:font-weight-complex="bold"/>
    </style:style>
    <style:style style:name="T21" style:family="text">
      <style:text-properties officeooo:rsid="0013643b"/>
    </style:style>
    <style:style style:name="T22" style:family="text">
      <style:text-properties style:font-name="DejaVu Serif Condensed" officeooo:rsid="0013643b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style:text-underline-style="none" officeooo:rsid="0013643b" style:font-style-asian="italic" style:font-style-complex="italic"/>
    </style:style>
    <style:style style:name="T25" style:family="text">
      <style:text-properties fo:font-style="italic" style:text-underline-style="none" officeooo:rsid="0014d948" style:font-style-asian="italic" style:font-style-complex="italic"/>
    </style:style>
    <style:style style:name="T26" style:family="text">
      <style:text-properties fo:font-weight="bold" officeooo:rsid="0013643b" style:font-weight-asian="bold" style:font-weight-complex="bold"/>
    </style:style>
    <style:style style:name="T27" style:family="text">
      <style:text-properties officeooo:rsid="0014d948"/>
    </style:style>
    <style:style style:name="T28" style:family="text">
      <style:text-properties style:font-name="DejaVu Serif Condensed" officeooo:rsid="0014d948"/>
    </style:style>
    <style:style style:name="T29" style:family="text">
      <style:text-properties style:font-name="DejaVu Serif Condensed" fo:font-size="12pt" fo:font-style="normal" style:text-underline-style="none" fo:font-weight="normal" officeooo:rsid="0014d94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erif Condensed" fo:font-size="12pt" fo:font-style="normal" style:text-underline-style="none" style:font-size-asian="12pt" style:font-style-asian="normal" style:font-size-complex="12pt" style:font-style-complex="normal"/>
    </style:style>
    <style:style style:name="T31" style:family="text">
      <style:text-properties style:font-name="DejaVu Serif Condensed" fo:font-size="14pt" fo:font-style="italic" style:text-underline-style="none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ngineering Glossary</text:span><text:span text:style-name="T1"/></text:p>
      <text:p text:style-name="P2" loext:marker-style-name="T2"/>
      <text:p text:style-name="P1" loext:marker-style-name="T3"><text:span text:style-name="T4">Project</text:span><text:span text:style-name="T3"> ----------------------------------------- Virtual Machine Operating System</text:span></text:p>
      <text:p text:style-name="P1" loext:marker-style-name="T3"><text:span text:style-name="T4">Document Number</text:span><text:span text:style-name="T5"> </text:span><text:span text:style-name="T3">----------------------- UVU</text:span></text:p>
      <text:p text:style-name="P1" loext:marker-style-name="T3"><text:span text:style-name="T4">Author </text:span><text:span text:style-name="T3">----------------------------------------- Dean Oakeson</text:span></text:p>
      <text:p text:style-name="P1" loext:marker-style-name="T3"><text:span text:style-name="T4">Status</text:span><text:span text:style-name="T3"> ------------------------------------------ Draft</text:span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1" loext:marker-style-name="T1"><text:span text:style-name="T1">index</text:span><text:span text:style-name="T1"/></text:p>
      <text:p text:style-name="P4" loext:marker-style-name="T1"/>
      <text:p text:style-name="P1" loext:marker-style-name="T3"><text:span text:style-name="T3">PG II ---------------------------------------------- </text:span><text:span text:style-name="T6">Hardware Layer</text:span></text:p>
      <text:p text:style-name="P1" loext:marker-style-name="T3"><text:span text:style-name="T3">PG III --------------------------------------------- </text:span><text:span text:style-name="T7">Kernel Layer</text:span></text:p>
      <text:p text:style-name="P1" loext:marker-style-name="T3"><text:span text:style-name="T3">PG IV - V <text:s/>--------------------------------------- </text:span><text:span text:style-name="T7">Shell Layer</text:span></text:p>
      <text:p text:style-name="P1" loext:marker-style-name="T3"><text:span text:style-name="T3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5"><text:soft-page-break/>Hardware Layer</text:p>
      <text:p text:style-name="P6" loext:marker-style-name="T1"/>
      <text:p text:style-name="P2" loext:marker-style-name="T2"/>
      <text:p text:style-name="P7"><text:span text:style-name="T8">“pcb.h</text:span><text:span text:style-name="T2">”, “</text:span><text:span text:style-name="T8">ram.h</text:span><text:span text:style-name="T2">”, “</text:span><text:span text:style-name="T8">vm</text:span><text:span text:style-name="T2">.</text:span><text:span text:style-name="T8">cpp</text:span><text:span text:style-name="T2">”, “</text:span><text:span text:style-name="T8">vm.h</text:span><text:span text:style-name="T2">”</text:span></text:p>
      <text:p text:style-name="P2" loext:marker-style-name="T2"/>
      <text:p text:style-name="P1" loext:marker-style-name="T2"><text:span text:style-name="T9"><text:s/>-</text:span><text:span text:style-name="T10">I</text:span><text:span text:style-name="T11">nitialize and provide system memory, and provide cpu instructions to be executed. </text:span></text:p>
      <text:p text:style-name="P1" loext:marker-style-name="T2"><text:span text:style-name="T4"/></text:p>
      <text:p text:style-name="P8" loext:marker-style-name="T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Pcb.h</text:p>
      <text:p text:style-name="P9"/>
      <text:p text:style-name="P6"/>
      <text:p text:style-name="P10">-<text:span text:style-name="T13">OVERVIEW-</text:span></text:p>
      <text:p text:style-name="P11"/>
      <text:p text:style-name="P12" loext:marker-style-name="T14">- The header file for the PCB structure: The PCB structure is initialized then pushed onto the scheduling queues where once terminated is used to deallocate memory and the structure is not completely destroyed but given to the <text:span text:style-name="T15">errorHandler</text:span> to log the data and keep within a <text:span text:style-name="T15">processLog</text:span> structure.</text:p>
      <text:p text:style-name="P12" loext:marker-style-name="T14"/>
      <text:p text:style-name="P13" loext:marker-style-name="T14">REGISTERS, pId, pState, pLoadAddress, pEndAddress, pFirstInstruction, pSize, pKernelMode, pArrivalTime, pTerminationTime, wait, response, turnaround, <text:span text:style-name="T13">pPriority, pQuantumCount</text:span></text:p>
      <text:p text:style-name="P13" loext:marker-style-name="T14"/>
      <text:p text:style-name="P14">-<text:span text:style-name="T13">METHODS-</text:span></text:p>
      <text:p text:style-name="P15"/>
      <text:p text:style-name="P15"><text:span text:style-name="T15">updateState() </text:span>- updates state of PCB as the PCB is passed between queues during run time.</text:p>
      <text:p text:style-name="P13">captureTimeSlice() <text:span text:style-name="T16">- logs clock tick within the cpuTimeSlices vector</text:span></text:p>
      <text:p text:style-name="P16">promotePriority()<text:span text:style-name="T16">- </text:span><text:span text:style-name="T17">promotes priority for mlfq scheduling algo</text:span></text:p>
      <text:p text:style-name="P16">demotePriority()<text:span text:style-name="T16">- </text:span><text:span text:style-name="T17">demotes priority for mlfq scheduling algo</text:span></text:p>
      <text:p text:style-name="P16">incrementQuantumCount()<text:span text:style-name="T16">- </text:span><text:span text:style-name="T17">pQuantumCount ++</text:span></text:p>
      <text:p text:style-name="P16">decrementQuantumCount()<text:span text:style-name="T16">- <text:s/></text:span><text:span text:style-name="T17">pQuantumCount --</text:span></text:p>
      <text:p text:style-name="P16">resetQuantumCount()<text:span text:style-name="T16">- </text:span><text:span text:style-name="T17">resets quantumCount to 0</text:span></text:p>
      <text:p text:style-name="P13">calculateWait()</text:p>
      <text:p text:style-name="P13">calculateResponse()</text:p>
      <text:p text:style-name="P13">calculateTurnAround()</text:p>
      <text:p text:style-name="P17"/>
      <text:p text:style-name="P18">-<text:span text:style-name="T18">NOTES</text:span><text:span text:style-name="T13">-</text:span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vm.cpp</text:p>
      <text:p text:style-name="P21"/>
      <text:p text:style-name="P20"/>
      <text:p text:style-name="P18">-<text:span text:style-name="T13">OVERVIEW-</text:span></text:p>
      <text:p text:style-name="P22"/>
      <text:p text:style-name="P23" loext:marker-style-name="T14">The <text:span text:style-name="T13">heart of the virtual machine, it runs instructions loaded in ram 1 at a time based on OP codes that are contained within the first byte of a 6 BYTE OP code.</text:span></text:p>
      <text:p text:style-name="P23" loext:marker-style-name="T14"/>
      <text:p text:style-name="P16" loext:marker-style-name="T14">REGISTERS, <text:span text:style-name="T13">byteOffset, wordOffset, swiOpCode, clock, ram</text:span></text:p>
      <text:p text:style-name="P16" loext:marker-style-name="T14"/>
      <text:p text:style-name="P18">-<text:span text:style-name="T13">METHODS-</text:span></text:p>
      <text:p text:style-name="P24"/>
      <text:p text:style-name="P24"><text:span text:style-name="T19">idle</text:span><text:span text:style-name="T15">() </text:span>- <text:span text:style-name="T13">idles the clock, useful when no programs are currently active but one is there are still programs slated to be run in the future.</text:span></text:p>
      <text:p text:style-name="P24"/>
      <text:p text:style-name="P24"><text:span text:style-name="T19">fetchDecodeExecute</text:span><text:span text:style-name="T15">() </text:span>- <text:span text:style-name="T13">ireads the opCode from a pointer in ram, it decodes and executes the command.</text:span></text:p>
      <text:p text:style-name="P2" loext:marker-style-name="T2"/>
      <text:p text:style-name="P2" loext:marker-style-name="T2"/>
      <text:p text:style-name="P18">-<text:span text:style-name="T18">NOTES</text:span><text:span text:style-name="T13">-</text:span></text:p>
      <text:p text:style-name="P2" loext:marker-style-name="T2"/>
      <text:p text:style-name="P25" loext:marker-style-name="T2">- Contains a built in stack pointer to halt CPU instruction if it reaches the end of the PCB size. (THIS WILL NEED TO BE ELIMINATED ONCE PAGING IS IMPLEMENTED)</text:p>
      <text:p text:style-name="P25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6" loext:marker-style-name="T1"/>
      <text:p text:style-name="P27"><text:soft-page-break/>ram.h</text:p>
      <text:p text:style-name="P27"/>
      <text:p text:style-name="P28"/>
      <text:p text:style-name="P18">-<text:span text:style-name="T13">OVERVIEW-</text:span></text:p>
      <text:p text:style-name="P29"/>
      <text:p text:style-name="P30" loext:marker-style-name="T14">Stores all loaded instructions from user loaded programs, to provide them at demand to the CPU.</text:p>
      <text:p text:style-name="P23" loext:marker-style-name="T14"/>
      <text:p text:style-name="P16" loext:marker-style-name="T14"><text:span text:style-name="T18">mem, vMemoryLookup, vMemory</text:span></text:p>
      <text:p text:style-name="P16" loext:marker-style-name="T14"/>
      <text:p text:style-name="P18">-<text:span text:style-name="T13">METHODS-</text:span></text:p>
      <text:p text:style-name="P24"/>
      <text:p text:style-name="P24"><text:span text:style-name="T20">pcbLookup(</text:span><text:span text:style-name="T15">) </text:span>- <text:span text:style-name="T18">takes a string, searches the vMemory table for PCBs with the name of the entered string. If found it returns a pointer to the found PCB.</text:span></text:p>
      <text:p text:style-name="P24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1"><text:soft-page-break/><text:span text:style-name="T21">Kernel</text:span> Layer</text:p>
      <text:p text:style-name="P32" loext:marker-style-name="T1"/>
      <text:p text:style-name="P33" loext:marker-style-name="T2"/>
      <text:p text:style-name="P34"><text:span text:style-name="T8">“</text:span><text:span text:style-name="T22">erroHandler.cpp</text:span><text:span text:style-name="T2">”, “</text:span><text:span text:style-name="T22">kernel.cpp</text:span><text:span text:style-name="T2">”, “</text:span><text:span text:style-name="T22">loader</text:span><text:span text:style-name="T2">.</text:span><text:span text:style-name="T8">cpp</text:span><text:span text:style-name="T2">”, “</text:span><text:span text:style-name="T22">processlog</text:span><text:span text:style-name="T8">.</text:span><text:span text:style-name="T22">cpp</text:span><text:span text:style-name="T2">”, “</text:span><text:span text:style-name="T22">scheduler.cpp”</text:span></text:p>
      <text:p text:style-name="P33" loext:marker-style-name="T2"/>
      <text:p text:style-name="P35" loext:marker-style-name="T2"><text:span text:style-name="T23"><text:s/>- </text:span><text:span text:style-name="T24">Coordinates pcb scheduling, handles errors, loads programs in to memory and stores logs of operating system data </text:span><text:span text:style-name="T25">and manages the hardware utilization.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6"><text:soft-page-break/>errorHandler.cpp</text:p>
      <text:p text:style-name="P37"/>
      <text:p text:style-name="P38"/>
      <text:p text:style-name="P39">-<text:span text:style-name="T13">OVERVIEW-</text:span></text:p>
      <text:p text:style-name="P40"/>
      <text:p text:style-name="P41" loext:marker-style-name="T14">Collects and displays logged errors and data.</text:p>
      <text:p text:style-name="P42" loext:marker-style-name="T14"/>
      <text:p text:style-name="P43" loext:marker-style-name="T14">FilePath, errorList, colorMap</text:p>
      <text:p text:style-name="P44" loext:marker-style-name="T14"/>
      <text:p text:style-name="P39">-<text:span text:style-name="T13">METHODS-</text:span></text:p>
      <text:p text:style-name="P45"/>
      <text:p text:style-name="P45"><text:span text:style-name="T26">setVerbosityFlat</text:span><text:span text:style-name="T15">() </text:span>- <text:span text:style-name="T21">changes the verbosity flag from true to false or false to true.</text:span></text:p>
      <text:p text:style-name="P45"><text:span text:style-name="T26">LogTerminatedProcesses</text:span><text:span text:style-name="T15">() </text:span>- <text:span text:style-name="T13">ireads the opCode from a pointer in ram, it decodes and executes the command.</text:span></text:p>
      <text:p text:style-name="P45"><text:span text:style-name="T26">getCpuLog</text:span><text:span text:style-name="T15">() </text:span>- <text:span text:style-name="T13">ireads the opCode from a pointer in ram, it decodes and executes the command.</text:span></text:p>
      <text:p text:style-name="P45"><text:span text:style-name="T26">errorDump(</text:span><text:span text:style-name="T15">) </text:span>- <text:span text:style-name="T13">ireads the opCode from a pointer in ram, it decodes and executes the command.</text:span></text:p>
      <text:p text:style-name="P45"><text:span text:style-name="T26">coreDump</text:span><text:span text:style-name="T15">() </text:span>- <text:span text:style-name="T13">ireads the opCode from a pointer in ram, it decodes and executes the command.</text:span></text:p>
      <text:p text:style-name="P45"><text:span text:style-name="T26">memDumpAll</text:span><text:span text:style-name="T15">() </text:span>- <text:span text:style-name="T13">ireads the opCode from a pointer in ram, it decodes and executes the command.</text:span></text:p>
      <text:p text:style-name="P45"><text:span text:style-name="T26">memDump</text:span><text:span text:style-name="T15">() </text:span>- <text:span text:style-name="T13">ireads the opCode from a pointer in ram, it decodes and executes the command.</text:span></text:p>
      <text:p text:style-name="P45"><text:span text:style-name="T26">printPrcGannt</text:span><text:span text:style-name="T15">() </text:span>- <text:span text:style-name="T13">ireads the opCode from a pointer in ram, it decodes and executes the command.</text:span></text:p>
      <text:p text:style-name="P45"><text:span text:style-name="T26">printLogGannt</text:span><text:span text:style-name="T15">() </text:span>- <text:span text:style-name="T13">ireads the opCode from a pointer in ram, it decodes and executes the command.</text:span></text:p>
      <text:p text:style-name="P33" loext:marker-style-name="T2"/>
      <text:p text:style-name="P39">-<text:span text:style-name="T18">NOTES</text:span><text:span text:style-name="T13">-</text:span></text:p>
      <text:p text:style-name="P33" loext:marker-style-name="T2"/>
      <text:p text:style-name="P46" loext:marker-style-name="T2">- Contains a built in stack pointer to halt CPU instruction if it reaches the end of the PCB size. (THIS WILL NEED TO BE ELIMINATED ONCE PAGING IS IMPLEMENTED)</text:p>
      <text:p text:style-name="P46" loext:marker-style-name="T2"/>
      <text:p text:style-name="P46" loext:marker-style-name="T2"/>
      <text:p text:style-name="P46" loext:marker-style-name="T2"/>
      <text:p text:style-name="P46" loext:marker-style-name="T2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><text:soft-page-break/></text:p>
      <text:p text:style-name="P47"><text:span text:style-name="T27">Shell</text:span> Layer</text:p>
      <text:p text:style-name="P48" loext:marker-style-name="T1"/>
      <text:p text:style-name="P49" loext:marker-style-name="T2"/>
      <text:p text:style-name="P50"><text:span text:style-name="T8">“</text:span><text:span text:style-name="T28">shell.</text:span><text:span text:style-name="T22">cpp</text:span><text:span text:style-name="T2">”</text:span></text:p>
      <text:p text:style-name="P49" loext:marker-style-name="T2"/>
      <text:p text:style-name="P51" loext:marker-style-name="T2"><text:span text:style-name="T23"><text:s/>- </text:span><text:span text:style-name="T29">Provides the user the ability to interact with the kernel.</text:span></text:p>
      <text:p text:style-name="P1" loext:marker-style-name="T30"><text:span text:style-name="T3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erif Condensed" svg:font-family="'DejaVu Serif Condensed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left" style:justify-single-word="false" style:writing-mode="lr-tb"/>
    </style:style>
    <style:page-layout style:name="Mpm1" style:page-usage="mirrored">
      <style:page-layout-properties fo:page-width="8.5in" fo:page-height="11in" style:num-format="I" style:print-orientation="portrait" fo:margin-top="0.7874in" fo:margin-bottom="0.7874in" fo:margin-left="0.7874in" fo:margin-right="0.7874in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_Page_Style1"/><text:page-number text:select-page="current">VI</text:page-number><text:s/>/ <text:page-count>VIII</text:page-count><text:bookmark-end text:name="PageNumWizard_FOOTER_Default_Page_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21:17:50</meta:creation-date>
    <dc:language>en-US</dc:language>
    <dc:date>2026-03-29T18:54:20.247272800</dc:date>
    <meta:editing-cycles>6</meta:editing-cycles>
    <meta:editing-duration>PT1H54M1S</meta:editing-duration>
    <meta:generator>LibreOffice/26.2.0.3$Linux_X86_64 LibreOffice_project/620$Build-3</meta:generator>
    <meta:document-statistic meta:table-count="0" meta:image-count="0" meta:object-count="0" meta:page-count="8" meta:paragraph-count="66" meta:word-count="574" meta:character-count="3935" meta:non-whitespace-character-count="3421"/>
    <meta:user-defined meta:name="AppVersion">15.0000</meta:user-defined>
  </office:meta>
</office:document-meta>
</file>